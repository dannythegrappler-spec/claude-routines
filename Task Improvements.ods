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>
    <style:style style:name="HeaderStyle" style:family="table-cell" style:display-name="HeaderStyle">
      <style:text-properties fo:font-weight="bold"/>
    </style:style>
    <style:style style:name="ColTasks" style:family="table-column" style:display-name="ColTasks">
      <style:table-column-properties style:column-width="3in"/>
    </style:style>
    <style:style style:name="ColGoals" style:family="table-column" style:display-name="ColGoals">
      <style:table-column-properties style:column-width="3in"/>
    </style:style>
    <style:style style:name="ColImprove" style:family="table-column" style:display-name="ColImprove">
      <style:table-column-properties style:column-width="4in"/>
    </style:style>
  </office:automatic-styles>
  <office:body>
    <office:spreadsheet>
      <table:table table:name="Checklist">
        <table:table-column table:style-name="ColTasks"/>
        <table:table-column table:style-name="ColGoals"/>
        <table:table-column table:style-name="ColImprove"/>
        <table:table-row>
          <table:table-cell table:style-name="HeaderStyle">
            <text:p>Tasks</text:p>
          </table:table-cell>
          <table:table-cell table:style-name="HeaderStyle">
            <text:p>Goals</text:p>
          </table:table-cell>
          <table:table-cell table:style-name="HeaderStyle">
            <text:p>Improvements</text:p>
          </table:table-cell>
        </table:table-row>
        <table:table-row>
          <table:table-cell>
            <text:p>Morning Routine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Cambrian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Cross the threshhold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Morning Prayer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weeps and tactics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Money Management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Guitar Training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Piano Training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inging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First Rally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Post Breakfast Weight Management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Flexibility Training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Training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oxing Training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Movement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Knowledge or Skills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tocks (Addon videos currently Separate)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Acting Training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creens</text:p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