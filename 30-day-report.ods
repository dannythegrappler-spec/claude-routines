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06:48:00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07:27:00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08:21:00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Done" office:value-type="string">
            <text:p>09:12:00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Done" office:value-type="string">
            <text:p>12:10:00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Done" office:value-type="string">
            <text:p>12:10:00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Done" office:value-type="string">
            <text:p>12:10:00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Done" office:value-type="string">
            <text:p>13:44:00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Done" office:value-type="string">
            <text:p>15:18:00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Done" office:value-type="string">
            <text:p>15:19:00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Done" office:value-type="string">
            <text:p>00:30:00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Done" office:value-type="string">
            <text:p>00:30:00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