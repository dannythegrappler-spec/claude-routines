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office:version="1.2">
  <office:automatic-styles>
    <style:style style:name="ceHeader" style:family="table-cell">
      <style:table-cell-properties fo:background-color="#2b2b2b"/>
      <style:text-properties fo:color="#ffffff" fo:font-weight="bold"/>
    </style:style>
    <style:style style:name="ceItem" style:family="table-cell">
      <style:text-properties fo:font-weight="bold"/>
    </style:style>
    <style:style style:name="ceNone" style:family="table-cell">
      <style:text-properties fo:color="#ff0000"/>
    </style:style>
    <style:style style:name="ceNull" style:family="table-cell">
      <style:text-properties fo:color="#bbbbbb" fo:font-style="italic"/>
    </style:style>
    <style:style style:name="ceDone" style:family="table-cell">
      <style:text-properties fo:color="#000000"/>
    </style:style>
    <style:style style:name="coWide" style:family="table-column">
      <style:table-column-properties style:column-width="1.8in"/>
    </style:style>
    <style:style style:name="coDay" style:family="table-column">
      <style:table-column-properties style:column-width="0.85in"/>
    </style:style>
  </office:automatic-styles>
  <office:body>
    <office:spreadsheet>
      <table:table table:name="30-Day Report">
        <table:table-column table:style-name="coWide"/>
        <table:table-column table:style-name="coDay" table:number-columns-repeated="30"/>
        <table:table-row>
          <table:table-cell table:style-name="ceHeader" office:value-type="string">
            <text:p>Item</text:p>
          </table:table-cell>
          <table:table-cell table:style-name="ceHeader" office:value-type="string">
            <text:p>Jul 23</text:p>
          </table:table-cell>
          <table:table-cell table:style-name="ceHeader" office:value-type="string">
            <text:p>Jul 22</text:p>
          </table:table-cell>
          <table:table-cell table:style-name="ceHeader" office:value-type="string">
            <text:p>Jul 21</text:p>
          </table:table-cell>
          <table:table-cell table:style-name="ceHeader" office:value-type="string">
            <text:p>Jul 20</text:p>
          </table:table-cell>
          <table:table-cell table:style-name="ceHeader" office:value-type="string">
            <text:p>Jul 19</text:p>
          </table:table-cell>
          <table:table-cell table:style-name="ceHeader" office:value-type="string">
            <text:p>Jul 18</text:p>
          </table:table-cell>
          <table:table-cell table:style-name="ceHeader" office:value-type="string">
            <text:p>Jul 17</text:p>
          </table:table-cell>
          <table:table-cell table:style-name="ceHeader" office:value-type="string">
            <text:p>Jul 16</text:p>
          </table:table-cell>
          <table:table-cell table:style-name="ceHeader" office:value-type="string">
            <text:p>Jul 15</text:p>
          </table:table-cell>
          <table:table-cell table:style-name="ceHeader" office:value-type="string">
            <text:p>Jul 14</text:p>
          </table:table-cell>
          <table:table-cell table:style-name="ceHeader" office:value-type="string">
            <text:p>Jul 13</text:p>
          </table:table-cell>
          <table:table-cell table:style-name="ceHeader" office:value-type="string">
            <text:p>Jul 12</text:p>
          </table:table-cell>
          <table:table-cell table:style-name="ceHeader" office:value-type="string">
            <text:p>Jul 11</text:p>
          </table:table-cell>
          <table:table-cell table:style-name="ceHeader" office:value-type="string">
            <text:p>Jul 10</text:p>
          </table:table-cell>
          <table:table-cell table:style-name="ceHeader" office:value-type="string">
            <text:p>Jul 9</text:p>
          </table:table-cell>
          <table:table-cell table:style-name="ceHeader" office:value-type="string">
            <text:p>Jul 8</text:p>
          </table:table-cell>
          <table:table-cell table:style-name="ceHeader" office:value-type="string">
            <text:p>Jul 7</text:p>
          </table:table-cell>
          <table:table-cell table:style-name="ceHeader" office:value-type="string">
            <text:p>Jul 6</text:p>
          </table:table-cell>
          <table:table-cell table:style-name="ceHeader" office:value-type="string">
            <text:p>Jul 5</text:p>
          </table:table-cell>
          <table:table-cell table:style-name="ceHeader" office:value-type="string">
            <text:p>Jul 4</text:p>
          </table:table-cell>
          <table:table-cell table:style-name="ceHeader" office:value-type="string">
            <text:p>Jul 3</text:p>
          </table:table-cell>
          <table:table-cell table:style-name="ceHeader" office:value-type="string">
            <text:p>Jul 2</text:p>
          </table:table-cell>
          <table:table-cell table:style-name="ceHeader" office:value-type="string">
            <text:p>Jul 1</text:p>
          </table:table-cell>
          <table:table-cell table:style-name="ceHeader" office:value-type="string">
            <text:p>Jun 30</text:p>
          </table:table-cell>
          <table:table-cell table:style-name="ceHeader" office:value-type="string">
            <text:p>Jun 29</text:p>
          </table:table-cell>
          <table:table-cell table:style-name="ceHeader" office:value-type="string">
            <text:p>Jun 28</text:p>
          </table:table-cell>
          <table:table-cell table:style-name="ceHeader" office:value-type="string">
            <text:p>Jun 27</text:p>
          </table:table-cell>
          <table:table-cell table:style-name="ceHeader" office:value-type="string">
            <text:p>Jun 26</text:p>
          </table:table-cell>
          <table:table-cell table:style-name="ceHeader" office:value-type="string">
            <text:p>Jun 25</text:p>
          </table:table-cell>
          <table:table-cell table:style-name="ceHeader" office:value-type="string">
            <text:p>Jun 24</text:p>
          </table:table-cell>
        </table:table-row>
        <table:table-row>
          <table:table-cell table:style-name="ceItem" office:value-type="string">
            <text:p>Start</text:p>
          </table:table-cell>
          <table:table-cell table:style-name="ceDone" office:value-type="string">
            <text:p>6:48 AM</text:p>
          </table:table-cell>
          <table:table-cell table:style-name="ceDone" office:value-type="string">
            <text:p>6:48 AM</text:p>
          </table:table-cell>
          <table:table-cell table:style-name="ceDone" office:value-type="string">
            <text:p>09:48:00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rning Routine</text:p>
          </table:table-cell>
          <table:table-cell table:style-name="ceDone" office:value-type="string">
            <text:p>39 min</text:p>
          </table:table-cell>
          <table:table-cell table:style-name="ceDone" office:value-type="string">
            <text:p>39 min</text:p>
          </table:table-cell>
          <table:table-cell table:style-name="ceDone" office:value-type="string">
            <text:p>11:45:00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Cambrian</text:p>
          </table:table-cell>
          <table:table-cell table:style-name="ceDone" office:value-type="string">
            <text:p>54 min</text:p>
          </table:table-cell>
          <table:table-cell table:style-name="ceDone" office:value-type="string">
            <text:p>54 min</text:p>
          </table:table-cell>
          <table:table-cell table:style-name="ceDone" office:value-type="string">
            <text:p>11:49:00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Cross the threshhold</text:p>
          </table:table-cell>
          <table:table-cell table:style-name="ceDone" office:value-type="string">
            <text:p>51 min</text:p>
          </table:table-cell>
          <table:table-cell table:style-name="ceDone" office:value-type="string">
            <text:p>51 min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rning Prayer</text:p>
          </table:table-cell>
          <table:table-cell table:style-name="ceDone" office:value-type="string">
            <text:p>2h 58m</text:p>
          </table:table-cell>
          <table:table-cell table:style-name="ceDone" office:value-type="string">
            <text:p>2h 58m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weeps and tactics</text:p>
          </table:table-cell>
          <table:table-cell table:style-name="ceDone" office:value-type="string">
            <text:p>0 min</text:p>
          </table:table-cell>
          <table:table-cell table:style-name="ceDone" office:value-type="string">
            <text:p>0 min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ney Management</text:p>
          </table:table-cell>
          <table:table-cell table:style-name="ceDone" office:value-type="string">
            <text:p>0 min</text:p>
          </table:table-cell>
          <table:table-cell table:style-name="ceDone" office:value-type="string">
            <text:p>0 min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Guitar Training</text:p>
          </table:table-cell>
          <table:table-cell table:style-name="ceDone" office:value-type="string">
            <text:p>1h 34m</text:p>
          </table:table-cell>
          <table:table-cell table:style-name="ceDone" office:value-type="string">
            <text:p>1h 34m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Piano Training</text:p>
          </table:table-cell>
          <table:table-cell table:style-name="ceDone" office:value-type="string">
            <text:p>1h 34m</text:p>
          </table:table-cell>
          <table:table-cell table:style-name="ceDone" office:value-type="string">
            <text:p>1h 34m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inging</text:p>
          </table:table-cell>
          <table:table-cell table:style-name="ceDone" office:value-type="string">
            <text:p>1 min</text:p>
          </table:table-cell>
          <table:table-cell table:style-name="ceDone" office:value-type="string">
            <text:p>1 min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First Rally</text:p>
          </table:table-cell>
          <table:table-cell table:style-name="ceDone" office:value-type="string">
            <text:p>9h 11m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Post Breakfast Weight Management</text:p>
          </table:table-cell>
          <table:table-cell table:style-name="ceDone" office:value-type="string">
            <text:p>0 min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Flexibility Training</text:p>
          </table:table-cell>
          <table:table-cell table:style-name="ceDone" office:value-type="string">
            <text:p>29 min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Training</text:p>
          </table:table-cell>
          <table:table-cell table:style-name="ceDone" office:value-type="string">
            <text:p>43 min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Boxing Training</text:p>
          </table:table-cell>
          <table:table-cell table:style-name="ceDone" office:value-type="string">
            <text:p>0 min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vement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Knowledge or Skills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tocks (Addon videos currently Separate)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Acting Training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creens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</table:table>
    </office:spreadsheet>
  </office:body>
</office:document-content>
</file>