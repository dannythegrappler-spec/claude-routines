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xsl-fo-compatible:1.0" xmlns:office="urn:oasis:names:tc:opendocument:xmlns:office:1.0" xmlns:table="urn:oasis:names:tc:opendocument:xmlns:table:1.0" xmlns:text="urn:oasis:names:tc:opendocument:xmlns:text:1.0" office:version="1.2">
  <office:automatic-styles>
    <ns1:style ns1:name="HeaderStyle" ns1:family="table-cell" ns1:display-name="HeaderStyle">
      <ns1:text-properties ns2:font-weight="bold"/>
      <ns1:table-cell-properties ns2:background-color="#D9D9D9"/>
    </ns1:style>
    <ns1:style ns1:name="ColWidth" ns1:family="table-column" ns1:display-name="ColWidth">
      <ns1:table-column-properties ns1:column-width="1.6in"/>
    </ns1:style>
  </office:automatic-styles>
  <office:body>
    <office:spreadsheet>
      <table:table table:name="Checklist">
        <table:table-column table:style-name="ColWidth"/>
        <table:table-column table:style-name="ColWidth"/>
        <table:table-column table:style-name="ColWidth"/>
        <table:table-column table:style-name="ColWidth"/>
        <table:table-column table:style-name="ColWidth"/>
        <table:table-column table:style-name="ColWidth"/>
        <table:table-row>
          <table:table-cell table:style-name="HeaderStyle" office:value-type="string">
            <text:p>Item</text:p>
          </table:table-cell>
          <table:table-cell table:style-name="HeaderStyle" office:value-type="string">
            <text:p>Completed</text:p>
          </table:table-cell>
          <table:table-cell table:style-name="HeaderStyle" office:value-type="string">
            <text:p>Priority</text:p>
          </table:table-cell>
          <table:table-cell table:style-name="HeaderStyle" office:value-type="string">
            <text:p>Time Completed</text:p>
          </table:table-cell>
          <table:table-cell table:style-name="HeaderStyle" office:value-type="string">
            <text:p>Goals</text:p>
          </table:table-cell>
          <table:table-cell table:style-name="HeaderStyle" office:value-type="string">
            <text:p>Improvements</text:p>
          </table:table-cell>
        </table:table-row>
        <table:table-row>
          <table:table-cell office:value-type="string">
            <text:p>Star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06H48M00S">
            <text:p>6:48 A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orning Routin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07H27M00S">
            <text:p>7:27 AM</text:p>
          </table:table-cell>
          <table:table-cell office:value-type="string">
            <text:p>[ ] Include 10 minutes cat play</text:p>
          </table:table-cell>
          <table:table-cell office:value-type="string">
            <text:p/>
          </table:table-cell>
        </table:table-row>
        <table:table-row>
          <table:table-cell office:value-type="string">
            <text:p>Cambrian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ross the threshhold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>[ ] Complete a ten minute williamson | [ ] Learn the full williamson and find the best way to systemize it</text:p>
          </table:table-cell>
          <table:table-cell office:value-type="string">
            <text:p/>
          </table:table-cell>
        </table:table-row>
        <table:table-row>
          <table:table-cell office:value-type="string">
            <text:p>Morning Prayer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weeps and tactic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oney Management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uitar Training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iano Training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inging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irst Rally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ost Breakfast Weight Management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exibility Training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ning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oxing Training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ovement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nowledge or Skill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ocks (Addon videos currently Separate)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cting Training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creen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