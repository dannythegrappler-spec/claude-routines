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office:version="1.2">
  <office:automatic-styles>
    <ns1:style ns1:name="HeaderStyle" ns1:family="table-cell" ns1:display-name="HeaderStyle">
      <ns1:text-properties ns2:font-weight="bold"/>
      <ns1:table-cell-properties ns2:background-color="#D9D9D9"/>
    </ns1:style>
    <ns1:style ns1:name="ColWidth" ns1:family="table-column" ns1:display-name="ColWidth">
      <ns1:table-column-properties ns1:column-width="1.6in"/>
    </ns1:style>
  </office:automatic-styles>
  <office:body>
    <office:spreadsheet>
      <table:table table:name="Checklist"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row>
          <table:table-cell table:style-name="HeaderStyle" office:value-type="string">
            <text:p>Item</text:p>
          </table:table-cell>
          <table:table-cell table:style-name="HeaderStyle" office:value-type="string">
            <text:p>Completed</text:p>
          </table:table-cell>
          <table:table-cell table:style-name="HeaderStyle" office:value-type="string">
            <text:p>Priority</text:p>
          </table:table-cell>
          <table:table-cell table:style-name="HeaderStyle" office:value-type="string">
            <text:p>Time Completed</text:p>
          </table:table-cell>
          <table:table-cell table:style-name="HeaderStyle" office:value-type="string">
            <text:p>Goals</text:p>
          </table:table-cell>
          <table:table-cell table:style-name="HeaderStyle" office:value-type="string">
            <text:p>Improvements</text:p>
          </table:table-cell>
        </table:table-row>
        <table:table-row>
          <table:table-cell office:value-type="string">
            <text:p>Sta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6H48M00S">
            <text:p>6:48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rning Rout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7H27M00S">
            <text:p>7:27 AM</text:p>
          </table:table-cell>
          <table:table-cell office:value-type="string">
            <text:p>[x] Include 10 minutes cat play</text:p>
          </table:table-cell>
          <table:table-cell office:value-type="string">
            <text:p/>
          </table:table-cell>
        </table:table-row>
        <table:table-row>
          <table:table-cell office:value-type="string">
            <text:p>Cambria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8H21M00S">
            <text:p>8:21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oss the threshhol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9H12M00S">
            <text:p>9:12 AM</text:p>
          </table:table-cell>
          <table:table-cell office:value-type="string">
            <text:p>[x] Complete a ten minute williamson | [ ] Learn the full williamson and find the best way to systemize it | [ ] Add audio refresher with mp3 player</text:p>
          </table:table-cell>
          <table:table-cell office:value-type="string">
            <text:p/>
          </table:table-cell>
        </table:table-row>
        <table:table-row>
          <table:table-cell office:value-type="string">
            <text:p>Morning Pray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eeps and tactic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ey Managem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itar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3H44M00S">
            <text:p>1:44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ano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8M00S">
            <text:p>3:18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ng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9M00S">
            <text:p>3:19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Rall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0H30M00S">
            <text:p>12:30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t Breakfast Weight Managem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TimeCell" office:value-type="time" office:time-value="PT00H30M00S">
            <text:p>12:30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xibility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0H59M00S">
            <text:p>12:59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1H42M00S">
            <text:p>1:42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xing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1H42M00S">
            <text:p>1:42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nowledge or Skill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cks (Addon videos currently Separate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reen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