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number="urn:oasis:names:tc:opendocument:xmlns:datastyle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number="urn:oasis:names:tc:opendocument:xmlns:datastyle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office:version="1.2">
  <office:automatic-styles>
    <style:style style:name="HeaderCell" style:family="table-cell" style:display-name="HeaderCell">
      <style:text-properties fo:font-weight="bold"/>
    </style:style>
    <style:style style:name="TimeCell" style:family="table-cell" style:data-style-name="TimeHHMM" style:display-name="TimeCell"/>
    <style:style style:name="ColWidth" style:family="table-column" style:display-name="ColWidth">
      <style:table-column-properties style:column-width="1.8in"/>
    </style:style>
    <style:style style:name="ColWidthWide" style:family="table-column" style:display-name="ColWidthWide">
      <style:table-column-properties style:column-width="2.4in"/>
    </style:style>
  </office:automatic-styles>
  <office:body>
    <office:spreadsheet>
      <table:table table:name="Checklist"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Wide"/>
        <table:table-column table:style-name="ColWidthWide"/>
        <table:table-row>
          <table:table-cell table:style-name="HeaderCell" office:value-type="string">
            <text:p>Item</text:p>
          </table:table-cell>
          <table:table-cell table:style-name="HeaderCell" office:value-type="string">
            <text:p>Completed</text:p>
          </table:table-cell>
          <table:table-cell table:style-name="HeaderCell" office:value-type="string">
            <text:p>Priority</text:p>
          </table:table-cell>
          <table:table-cell table:style-name="HeaderCell" office:value-type="string">
            <text:p>Time Completed</text:p>
          </table:table-cell>
          <table:table-cell table:style-name="HeaderCell" office:value-type="string">
            <text:p>Goals</text:p>
          </table:table-cell>
          <table:table-cell table:style-name="HeaderCell" office:value-type="string">
            <text:p>Improvements</text:p>
          </table:table-cell>
        </table:table-row>
        <table:table-row>
          <table:table-cell office:value-type="string">
            <text:p>Star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6H48M00S">
            <text:p>6:48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rning Routi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7H27M00S">
            <text:p>7:27 AM</text:p>
          </table:table-cell>
          <table:table-cell office:value-type="string">
            <text:p>[ ] Include 10 minutes cat play</text:p>
          </table:table-cell>
          <table:table-cell office:value-type="string">
            <text:p/>
          </table:table-cell>
        </table:table-row>
        <table:table-row>
          <table:table-cell office:value-type="string">
            <text:p>Cambrian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ross the threshhold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>[ ] Complete a ten minute williamson | [ ] Learn the full williamson and find the best way to systemize it</text:p>
          </table:table-cell>
        </table:table-row>
        <table:table-row>
          <table:table-cell office:value-type="string">
            <text:p>Morning Prayer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weeps and tactic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ney Managemen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uitar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ano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ing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rst Rally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st Breakfast Weight Managemen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xibility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oxing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vemen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nowledge or Skill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ocks (Addon videos currently Separate)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ting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creen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number="urn:oasis:names:tc:opendocument:xmlns:datastyle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office:version="1.2">
  <office:styles>
    <number:time-style style:name="TimeHHMM" style:display-name="TimeHHMM">
      <number:hours number:style="short"/>
      <number:text>:</number:text>
      <number:minutes number:style="long"/>
      <number:text> </number:text>
      <number:am-pm/>
    </number:time-style>
    <number:time-style style:name="DurationHMS" number:truncate-on-overflow="false" style:display-name="DurationHMS">
      <number:hours number:style="long"/>
      <number:text>:</number:text>
      <number:minutes number:style="long"/>
      <number:text>:</number:text>
      <number:seconds number:style="long"/>
    </number:time-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number="urn:oasis:names:tc:opendocument:xmlns:datastyle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