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x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9H12M00S">
            <text:p>9:12 AM</text:p>
          </table:table-cell>
          <table:table-cell office:value-type="string">
            <text:p>[x] Complete a ten minute williamson | [ ] Learn the full williamson and find the best way to systemize it | [ ] Add audio refresher with mp3 player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2H10M00S">
            <text:p>12:10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3H44M00S">
            <text:p>1:44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8M00S">
            <text:p>3:18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15H19M00S">
            <text:p>3:19 P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