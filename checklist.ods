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xsl-fo-compatible:1.0" xmlns:office="urn:oasis:names:tc:opendocument:xmlns:office:1.0" xmlns:table="urn:oasis:names:tc:opendocument:xmlns:table:1.0" xmlns:text="urn:oasis:names:tc:opendocument:xmlns:text:1.0" office:version="1.2">
  <office:automatic-styles>
    <ns1:style ns1:name="HeaderStyle" ns1:family="table-cell" ns1:display-name="HeaderStyle">
      <ns1:text-properties ns2:font-weight="bold"/>
      <ns1:table-cell-properties ns2:background-color="#D9D9D9"/>
    </ns1:style>
    <ns1:style ns1:name="ColWidth" ns1:family="table-column" ns1:display-name="ColWidth">
      <ns1:table-column-properties ns1:column-width="1.6in"/>
    </ns1:style>
  </office:automatic-styles>
  <office:body>
    <office:spreadsheet>
      <table:table table:name="Checklist">
        <table:table-column table:style-name="ColWidth"/>
        <table:table-column table:style-name="ColWidth"/>
        <table:table-column table:style-name="ColWidth"/>
        <table:table-column table:style-name="ColWidth"/>
        <table:table-column table:style-name="ColWidth"/>
        <table:table-column table:style-name="ColWidth"/>
        <table:table-row>
          <table:table-cell table:style-name="HeaderStyle" office:value-type="string">
            <text:p>Item</text:p>
          </table:table-cell>
          <table:table-cell table:style-name="HeaderStyle" office:value-type="string">
            <text:p>Completed</text:p>
          </table:table-cell>
          <table:table-cell table:style-name="HeaderStyle" office:value-type="string">
            <text:p>Priority</text:p>
          </table:table-cell>
          <table:table-cell table:style-name="HeaderStyle" office:value-type="string">
            <text:p>Time Completed</text:p>
          </table:table-cell>
          <table:table-cell table:style-name="HeaderStyle" office:value-type="string">
            <text:p>Goals</text:p>
          </table:table-cell>
          <table:table-cell table:style-name="HeaderStyle" office:value-type="string">
            <text:p>Improvements</text:p>
          </table:table-cell>
        </table:table-row>
        <table:table-row>
          <table:table-cell office:value-type="string">
            <text:p>Star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06H48M00S">
            <text:p>6:48 AM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orning Routin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07H27M00S">
            <text:p>7:27 AM</text:p>
          </table:table-cell>
          <table:table-cell office:value-type="string">
            <text:p>[x] Include 10 minutes cat play</text:p>
          </table:table-cell>
          <table:table-cell office:value-type="string">
            <text:p/>
          </table:table-cell>
        </table:table-row>
        <table:table-row>
          <table:table-cell office:value-type="string">
            <text:p>Cambrian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08H21M00S">
            <text:p>8:21 AM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ross the threshhol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09H12M00S">
            <text:p>9:12 AM</text:p>
          </table:table-cell>
          <table:table-cell office:value-type="string">
            <text:p>[x] Complete a ten minute williamson | [ ] Learn the full williamson and find the best way to systemize it | [ ] Add audio refresher with mp3 player</text:p>
          </table:table-cell>
          <table:table-cell office:value-type="string">
            <text:p/>
          </table:table-cell>
        </table:table-row>
        <table:table-row>
          <table:table-cell office:value-type="string">
            <text:p>Morning Praye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12H10M00S">
            <text:p>12:10 PM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weeps and tactic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12H10M00S">
            <text:p>12:10 PM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oney Managemen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12H10M00S">
            <text:p>12:10 PM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Guitar Training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13H44M00S">
            <text:p>1:44 PM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iano Training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15H18M00S">
            <text:p>3:18 PM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inging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15H19M00S">
            <text:p>3:19 PM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irst Rally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00H30M00S">
            <text:p>12:30 AM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ost Breakfast Weight Management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style-name="TimeCell" office:value-type="time" office:time-value="PT00H30M00S">
            <text:p>12:30 AM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lexibility Training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00H59M00S">
            <text:p>12:59 AM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raining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oxing Training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ovement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Knowledge or Skill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ocks (Addon videos currently Separate)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cting Training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creen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